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list-format-name="NLF1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list-format-name="NLF1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27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8">
      <text:list-level-style-number text:level="1" text:style-name="WW_CharLFO28LVL1" style:num-suffix="." style:num-list-format-name="NLF0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9">
      <text:list-level-style-number text:level="1" text:style-name="WW_CharLFO29LVL1" style:num-suffix="." style:num-list-format-name="NLF0" style:num-format="1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85in" text:min-label-width="0.125in" text:list-level-position-and-space-mode="label-alignment">
          <style:list-level-label-alignment text:label-followed-by="listtab" fo:margin-left="2.9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35in" text:min-label-width="0.125in" text:list-level-position-and-space-mode="label-alignment">
          <style:list-level-label-alignment text:label-followed-by="listtab" fo:margin-left="4.4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85in" text:min-label-width="0.125in" text:list-level-position-and-space-mode="label-alignment">
          <style:list-level-label-alignment text:label-followed-by="listtab" fo:margin-left="5.975in" fo:text-indent="-0.125in"/>
        </style:list-level-properties>
      </text:list-level-style-number>
    </text:list-style>
    <text:list-style style:name="LFO30">
      <text:list-level-style-number text:level="1" text:style-name="WW_CharLFO30LVL1" style:num-suffix="." style:num-list-format-name="NLF0" style:num-format="1">
        <style:list-level-properties text:space-before="1.3777in" text:min-label-width="0.25in" text:list-level-position-and-space-mode="label-alignment">
          <style:list-level-label-alignment text:label-followed-by="listtab" fo:margin-left="1.627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8777in" text:min-label-width="0.25in" text:list-level-position-and-space-mode="label-alignment">
          <style:list-level-label-alignment text:label-followed-by="listtab" fo:margin-left="2.127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5027in" text:min-label-width="0.125in" text:list-level-position-and-space-mode="label-alignment">
          <style:list-level-label-alignment text:label-followed-by="listtab" fo:margin-left="2.627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8777in" text:min-label-width="0.25in" text:list-level-position-and-space-mode="label-alignment">
          <style:list-level-label-alignment text:label-followed-by="listtab" fo:margin-left="3.127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3777in" text:min-label-width="0.25in" text:list-level-position-and-space-mode="label-alignment">
          <style:list-level-label-alignment text:label-followed-by="listtab" fo:margin-left="3.627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0027in" text:min-label-width="0.125in" text:list-level-position-and-space-mode="label-alignment">
          <style:list-level-label-alignment text:label-followed-by="listtab" fo:margin-left="4.127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3777in" text:min-label-width="0.25in" text:list-level-position-and-space-mode="label-alignment">
          <style:list-level-label-alignment text:label-followed-by="listtab" fo:margin-left="4.627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8777in" text:min-label-width="0.25in" text:list-level-position-and-space-mode="label-alignment">
          <style:list-level-label-alignment text:label-followed-by="listtab" fo:margin-left="5.127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5027in" text:min-label-width="0.125in" text:list-level-position-and-space-mode="label-alignment">
          <style:list-level-label-alignment text:label-followed-by="listtab" fo:margin-left="5.6277in" fo:text-indent="-0.125in"/>
        </style:list-level-properties>
      </text:list-level-style-number>
    </text:list-style>
    <text:list-style style:name="LFO31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32">
      <text:list-level-style-number text:level="1" style:num-suffix="." style:num-list-format-name="NLF0" style:num-format="1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4.325in" text:min-label-width="0.125in" text:list-level-position-and-space-mode="label-alignment">
          <style:list-level-label-alignment text:label-followed-by="listtab" fo:margin-left="4.4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5.2in" text:min-label-width="0.25in" text:list-level-position-and-space-mode="label-alignment">
          <style:list-level-label-alignment text:label-followed-by="listtab" fo:margin-left="5.4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5.825in" text:min-label-width="0.125in" text:list-level-position-and-space-mode="label-alignment">
          <style:list-level-label-alignment text:label-followed-by="listtab" fo:margin-left="5.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6.2in" text:min-label-width="0.25in" text:list-level-position-and-space-mode="label-alignment">
          <style:list-level-label-alignment text:label-followed-by="listtab" fo:margin-left="6.4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6.7in" text:min-label-width="0.25in" text:list-level-position-and-space-mode="label-alignment">
          <style:list-level-label-alignment text:label-followed-by="listtab" fo:margin-left="6.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7.325in" text:min-label-width="0.125in" text:list-level-position-and-space-mode="label-alignment">
          <style:list-level-label-alignment text:label-followed-by="listtab" fo:margin-left="7.45in" fo:text-indent="-0.125in"/>
        </style:list-level-properties>
      </text:list-level-style-number>
    </text:list-style>
    <text:list-style style:name="LFO33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34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35">
      <text:list-level-style-number text:level="1" style:num-suffix="." style:num-list-format-name="NLF0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36">
      <text:list-level-style-number text:level="1" style:num-suffix="." style:num-list-format-name="NLF0" style:num-format="1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3416in" text:min-label-width="0.125in" text:list-level-position-and-space-mode="label-alignment">
          <style:list-level-label-alignment text:label-followed-by="listtab" fo:margin-left="3.466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8416in" text:min-label-width="0.125in" text:list-level-position-and-space-mode="label-alignment">
          <style:list-level-label-alignment text:label-followed-by="listtab" fo:margin-left="4.966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3416in" text:min-label-width="0.125in" text:list-level-position-and-space-mode="label-alignment">
          <style:list-level-label-alignment text:label-followed-by="listtab" fo:margin-left="6.4666in" fo:text-indent="-0.125in"/>
        </style:list-level-properties>
      </text:list-level-style-number>
    </text:list-style>
    <text:list-style style:name="LFO37">
      <text:list-level-style-number text:level="1" style:num-suffix="." style:num-list-format-name="NLF0" style:num-format="1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85in" text:min-label-width="0.125in" text:list-level-position-and-space-mode="label-alignment">
          <style:list-level-label-alignment text:label-followed-by="listtab" fo:margin-left="2.9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35in" text:min-label-width="0.125in" text:list-level-position-and-space-mode="label-alignment">
          <style:list-level-label-alignment text:label-followed-by="listtab" fo:margin-left="4.4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85in" text:min-label-width="0.125in" text:list-level-position-and-space-mode="label-alignment">
          <style:list-level-label-alignment text:label-followed-by="listtab" fo:margin-left="5.975in" fo:text-indent="-0.125in"/>
        </style:list-level-properties>
      </text:list-level-style-number>
    </text:list-style>
    <text:list-style style:name="LFO38">
      <text:list-level-style-number text:level="1" style:num-suffix="." style:num-list-format-name="NLF0" style:num-format="1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3416in" text:min-label-width="0.125in" text:list-level-position-and-space-mode="label-alignment">
          <style:list-level-label-alignment text:label-followed-by="listtab" fo:margin-left="3.466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8416in" text:min-label-width="0.125in" text:list-level-position-and-space-mode="label-alignment">
          <style:list-level-label-alignment text:label-followed-by="listtab" fo:margin-left="4.966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3416in" text:min-label-width="0.125in" text:list-level-position-and-space-mode="label-alignment">
          <style:list-level-label-alignment text:label-followed-by="listtab" fo:margin-left="6.4666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Car.predefinitoparagrafo" style:family="text">
      <style:text-properties fo:font-size="14pt" style:font-size-asian="14pt" style:font-size-complex="14pt"/>
    </style:style>
    <style:style style:name="T6" style:parent-style-name="Car.predefinitoparagrafo" style:family="text">
      <style:text-properties fo:font-size="14pt" style:font-size-asian="14pt" style:font-size-complex="14pt"/>
    </style:style>
    <style:style style:name="T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Car.predefinitoparagrafo" style:family="text">
      <style:text-properties fo:font-size="14pt" style:font-size-asian="14pt" style:font-size-complex="14pt"/>
    </style:style>
    <style:style style:name="P11" style:parent-style-name="Normale" style:family="paragraph">
      <style:text-properties fo:font-size="14pt" style:font-size-asian="14pt" style:font-size-complex="14pt"/>
    </style:style>
    <style:style style:name="P12" style:parent-style-name="Normale" style:family="paragraph">
      <style:text-properties fo:font-size="14pt" style:font-size-asian="14pt" style:font-size-complex="14pt"/>
    </style:style>
    <style:style style:name="P13" style:parent-style-name="Normale" style:family="paragraph">
      <style:text-properties fo:font-size="14pt" style:font-size-asian="14pt" style:font-size-complex="14pt"/>
    </style:style>
    <style:style style:name="P14" style:parent-style-name="Normale" style:family="paragraph">
      <style:text-properties fo:font-size="14pt" style:font-size-asian="14pt" style:font-size-complex="14pt"/>
    </style:style>
    <style:style style:name="T1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1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P22" style:parent-style-name="Normale" style:family="paragraph">
      <style:text-properties fo:font-weight="bold" style:font-weight-asian="bold" style:font-weight-complex="bold"/>
    </style:style>
    <style:style style:name="P23" style:parent-style-name="Normale" style:family="paragraph">
      <style:text-properties fo:font-weight="bold" style:font-weight-asian="bold" style:font-weight-complex="bold"/>
    </style:style>
    <style:style style:name="P24" style:parent-style-name="Normale" style:family="paragraph">
      <style:text-properties fo:font-weight="bold" style:font-weight-asian="bold" style:font-weight-complex="bold"/>
    </style:style>
    <style:style style:name="T2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8" style:parent-style-name="Car.predefinitoparagrafo" style:family="text">
      <style:text-properties fo:font-size="14pt" style:font-size-asian="14pt" style:font-size-complex="14pt"/>
    </style:style>
    <style:style style:name="T2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0" style:parent-style-name="Car.predefinitoparagrafo" style:family="text">
      <style:text-properties fo:font-size="14pt" style:font-size-asian="14pt" style:font-size-complex="14pt"/>
    </style:style>
    <style:style style:name="T3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2" style:parent-style-name="Car.predefinitoparagrafo" style:family="text">
      <style:text-properties fo:font-size="14pt" style:font-size-asian="14pt" style:font-size-complex="14pt"/>
    </style:style>
    <style:style style:name="T3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5" style:parent-style-name="Car.predefinitoparagrafo" style:family="text">
      <style:text-properties fo:font-size="14pt" style:font-size-asian="14pt" style:font-size-complex="14pt"/>
    </style:style>
    <style:style style:name="T3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7" style:parent-style-name="Car.predefinitoparagrafo" style:family="text">
      <style:text-properties fo:font-size="14pt" style:font-size-asian="14pt" style:font-size-complex="14pt"/>
    </style:style>
    <style:style style:name="T3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9" style:parent-style-name="Car.predefinitoparagrafo" style:family="text">
      <style:text-properties fo:font-size="14pt" style:font-size-asian="14pt" style:font-size-complex="14pt"/>
    </style:style>
    <style:style style:name="T4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1" style:parent-style-name="Car.predefinitoparagrafo" style:family="text">
      <style:text-properties fo:font-size="14pt" style:font-size-asian="14pt" style:font-size-complex="14pt"/>
    </style:style>
    <style:style style:name="T4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3" style:parent-style-name="Car.predefinitoparagrafo" style:family="text">
      <style:text-properties fo:font-size="14pt" style:font-size-asian="14pt" style:font-size-complex="14pt"/>
    </style:style>
    <style:style style:name="P44" style:parent-style-name="Normale" style:family="paragraph">
      <style:text-properties fo:font-size="14pt" style:font-size-asian="14pt" style:font-size-complex="14pt"/>
    </style:style>
    <style:style style:name="P45" style:parent-style-name="Normale" style:family="paragraph">
      <style:text-properties fo:font-size="14pt" style:font-size-asian="14pt" style:font-size-complex="14pt"/>
    </style:style>
    <style:style style:name="P4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Paragrafoelenco" style:list-style-name="LFO14" style:family="paragraph">
      <style:text-properties fo:font-size="14pt" style:font-size-asian="14pt" style:font-size-complex="14pt"/>
    </style:style>
    <style:style style:name="P48" style:parent-style-name="Paragrafoelenco" style:list-style-name="LFO14" style:family="paragraph">
      <style:text-properties fo:font-size="14pt" style:font-size-asian="14pt" style:font-size-complex="14pt"/>
    </style:style>
    <style:style style:name="P49" style:parent-style-name="Paragrafoelenco" style:list-style-name="LFO14" style:family="paragraph">
      <style:text-properties fo:font-size="14pt" style:font-size-asian="14pt" style:font-size-complex="14pt"/>
    </style:style>
    <style:style style:name="P50" style:parent-style-name="Paragrafoelenco" style:list-style-name="LFO14" style:family="paragraph">
      <style:text-properties fo:font-size="14pt" style:font-size-asian="14pt" style:font-size-complex="14pt"/>
    </style:style>
    <style:style style:name="P51" style:parent-style-name="Paragrafoelenco" style:list-style-name="LFO14" style:family="paragraph">
      <style:text-properties fo:font-size="14pt" style:font-size-asian="14pt" style:font-size-complex="14pt"/>
    </style:style>
    <style:style style:name="P52" style:parent-style-name="Normale" style:family="paragraph">
      <style:text-properties fo:font-size="14pt" style:font-size-asian="14pt" style:font-size-complex="14pt"/>
    </style:style>
    <style:style style:name="P53" style:parent-style-name="Normale" style:family="paragraph">
      <style:text-properties fo:font-size="14pt" style:font-size-asian="14pt" style:font-size-complex="14pt"/>
    </style:style>
    <style:style style:name="P54" style:parent-style-name="Normale" style:family="paragraph">
      <style:text-properties fo:font-size="14pt" style:font-size-asian="14pt" style:font-size-complex="14pt"/>
    </style:style>
    <style:style style:name="P55" style:parent-style-name="Normale" style:family="paragraph">
      <style:text-properties fo:font-size="14pt" style:font-size-asian="14pt" style:font-size-complex="14pt"/>
    </style:style>
    <style:style style:name="P5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5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5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9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Normale" style:family="paragraph">
      <style:text-properties fo:font-size="14pt" style:font-size-asian="14pt" style:font-size-complex="14pt"/>
    </style:style>
    <style:style style:name="T61" style:parent-style-name="Car.predefinitoparagrafo" style:family="text">
      <style:text-properties fo:font-size="14pt" style:font-size-asian="14pt" style:font-size-complex="14pt"/>
    </style:style>
    <style:style style:name="P6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63" style:parent-style-name="Paragrafoelenco" style:list-style-name="LFO15" style:family="paragraph">
      <style:text-properties fo:font-size="14pt" style:font-size-asian="14pt" style:font-size-complex="14pt"/>
    </style:style>
    <style:style style:name="P64" style:parent-style-name="Paragrafoelenco" style:list-style-name="LFO15" style:family="paragraph">
      <style:text-properties fo:font-size="14pt" style:font-size-asian="14pt" style:font-size-complex="14pt"/>
    </style:style>
    <style:style style:name="P65" style:parent-style-name="Paragrafoelenco" style:list-style-name="LFO15" style:family="paragraph"/>
    <style:style style:name="T66" style:parent-style-name="Car.predefinitoparagrafo" style:family="text">
      <style:text-properties fo:font-size="14pt" style:font-size-asian="14pt" style:font-size-complex="14pt"/>
    </style:style>
    <style:style style:name="T67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8" style:parent-style-name="Car.predefinitoparagrafo" style:family="text">
      <style:text-properties fo:font-size="14pt" style:font-size-asian="14pt" style:font-size-complex="14pt"/>
    </style:style>
    <style:style style:name="P69" style:parent-style-name="Paragrafoelenco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7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71" style:parent-style-name="Paragrafoelenco" style:list-style-name="LFO16" style:family="paragraph">
      <style:text-properties fo:font-size="14pt" style:font-size-asian="14pt" style:font-size-complex="14pt"/>
    </style:style>
    <style:style style:name="P72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73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74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T7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76" style:parent-style-name="Normale" style:family="paragraph">
      <style:text-properties fo:font-size="14pt" style:font-size-asian="14pt" style:font-size-complex="14pt"/>
    </style:style>
    <style:style style:name="P77" style:parent-style-name="Normale" style:family="paragraph">
      <style:text-properties fo:font-size="14pt" style:font-size-asian="14pt" style:font-size-complex="14pt"/>
    </style:style>
    <style:style style:name="T7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79" style:parent-style-name="Normale" style:family="paragraph">
      <style:text-properties fo:font-size="14pt" style:font-size-asian="14pt" style:font-size-complex="14pt"/>
    </style:style>
    <style:style style:name="P80" style:parent-style-name="Normale" style:family="paragraph">
      <style:text-properties fo:font-size="14pt" style:font-size-asian="14pt" style:font-size-complex="14pt"/>
    </style:style>
    <style:style style:name="T8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82" style:parent-style-name="Normale" style:family="paragraph">
      <style:text-properties fo:font-size="14pt" style:font-size-asian="14pt" style:font-size-complex="14pt"/>
    </style:style>
    <style:style style:name="P83" style:parent-style-name="Normale" style:family="paragraph">
      <style:text-properties fo:font-size="14pt" style:font-size-asian="14pt" style:font-size-complex="14pt"/>
    </style:style>
    <style:style style:name="P84" style:parent-style-name="Normale" style:family="paragraph">
      <style:text-properties fo:font-size="14pt" style:font-size-asian="14pt" style:font-size-complex="14pt"/>
    </style:style>
    <style:style style:name="P8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86" style:parent-style-name="Paragrafoelenco" style:list-style-name="LFO17" style:family="paragraph">
      <style:text-properties fo:font-size="14pt" style:font-size-asian="14pt" style:font-size-complex="14pt"/>
    </style:style>
    <style:style style:name="P87" style:parent-style-name="Paragrafoelenco" style:list-style-name="LFO17" style:family="paragraph">
      <style:text-properties fo:font-size="14pt" style:font-size-asian="14pt" style:font-size-complex="14pt"/>
    </style:style>
    <style:style style:name="P88" style:parent-style-name="Paragrafoelenco" style:list-style-name="LFO17" style:family="paragraph">
      <style:text-properties fo:font-size="14pt" style:font-size-asian="14pt" style:font-size-complex="14pt"/>
    </style:style>
    <style:style style:name="P89" style:parent-style-name="Normale" style:family="paragraph">
      <style:text-properties fo:font-size="14pt" style:font-size-asian="14pt" style:font-size-complex="14pt"/>
    </style:style>
    <style:style style:name="P9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91" style:parent-style-name="Paragrafoelenco" style:list-style-name="LFO18" style:family="paragraph">
      <style:text-properties fo:font-size="14pt" style:font-size-asian="14pt" style:font-size-complex="14pt"/>
    </style:style>
    <style:style style:name="P9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93" style:parent-style-name="Normale" style:family="paragraph">
      <style:text-properties fo:font-size="14pt" style:font-size-asian="14pt" style:font-size-complex="14pt"/>
    </style:style>
    <style:style style:name="P94" style:parent-style-name="Normale" style:family="paragraph">
      <style:text-properties fo:font-size="14pt" style:font-size-asian="14pt" style:font-size-complex="14pt"/>
    </style:style>
    <style:style style:name="T9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7" style:parent-style-name="Car.predefinitoparagrafo" style:family="text">
      <style:text-properties fo:font-size="14pt" style:font-size-asian="14pt" style:font-size-complex="14pt"/>
    </style:style>
    <style:style style:name="T9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Car.predefinitoparagrafo" style:family="text">
      <style:text-properties fo:font-size="14pt" style:font-size-asian="14pt" style:font-size-complex="14pt"/>
    </style:style>
    <style:style style:name="T10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1" style:parent-style-name="Car.predefinitoparagrafo" style:family="text">
      <style:text-properties fo:font-size="14pt" style:font-size-asian="14pt" style:font-size-complex="14pt"/>
    </style:style>
    <style:style style:name="T10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103" style:parent-style-name="Normale" style:family="paragraph">
      <style:paragraph-properties fo:margin-left="0.25in">
        <style:tab-stops/>
      </style:paragraph-properties>
    </style:style>
    <style:style style:name="T10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5" style:parent-style-name="Car.predefinitoparagrafo" style:family="text">
      <style:text-properties fo:font-size="14pt" style:font-size-asian="14pt" style:font-size-complex="14pt"/>
    </style:style>
    <style:style style:name="P106" style:parent-style-name="Normale" style:family="paragraph">
      <style:paragraph-properties fo:margin-left="0.25in" fo:text-indent="0.2416in">
        <style:tab-stops/>
      </style:paragraph-properties>
      <style:text-properties fo:font-size="14pt" style:font-size-asian="14pt" style:font-size-complex="14pt"/>
    </style:style>
    <style:style style:name="P107" style:parent-style-name="Paragrafoelenco" style:list-style-name="LFO18" style:family="paragraph"/>
    <style:style style:name="T10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9" style:parent-style-name="Car.predefinitoparagrafo" style:family="text">
      <style:text-properties fo:font-size="14pt" style:font-size-asian="14pt" style:font-size-complex="14pt"/>
    </style:style>
    <style:style style:name="P11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11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11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3" style:parent-style-name="Car.predefinitoparagrafo" style:family="text">
      <style:text-properties fo:font-size="14pt" style:font-size-asian="14pt" style:font-size-complex="14pt"/>
    </style:style>
    <style:style style:name="T11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5" style:parent-style-name="Car.predefinitoparagrafo" style:family="text">
      <style:text-properties fo:font-size="14pt" style:font-size-asian="14pt" style:font-size-complex="14pt"/>
    </style:style>
    <style:style style:name="P116" style:parent-style-name="Normale" style:family="paragraph">
      <style:text-properties fo:font-size="14pt" style:font-size-asian="14pt" style:font-size-complex="14pt"/>
    </style:style>
    <style:style style:name="P11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18" style:parent-style-name="Normale" style:family="paragraph">
      <style:text-properties fo:font-size="14pt" style:font-size-asian="14pt" style:font-size-complex="14pt"/>
    </style:style>
    <style:style style:name="P119" style:parent-style-name="Normale" style:family="paragraph">
      <style:text-properties fo:font-size="14pt" style:font-size-asian="14pt" style:font-size-complex="14pt"/>
    </style:style>
    <style:style style:name="T120" style:parent-style-name="Car.predefinitoparagrafo" style:family="text">
      <style:text-properties fo:font-size="14pt" style:font-size-asian="14pt" style:font-size-complex="14pt"/>
    </style:style>
    <style:style style:name="P121" style:parent-style-name="Normale" style:family="paragraph">
      <style:text-properties fo:font-size="14pt" style:font-size-asian="14pt" style:font-size-complex="14pt"/>
    </style:style>
    <style:style style:name="P12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3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6" style:parent-style-name="Normale" style:family="paragraph">
      <style:text-properties fo:font-size="14pt" style:font-size-asian="14pt" style:font-size-complex="14pt"/>
    </style:style>
    <style:style style:name="P12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8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29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0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1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2" style:parent-style-name="Normale" style:family="paragraph">
      <style:paragraph-properties fo:text-indent="0.4916in"/>
      <style:text-properties fo:font-weight="bold" style:font-weight-asian="bold" style:font-weight-complex="bold" fo:font-size="14pt" style:font-size-asian="14pt" style:font-size-complex="14pt"/>
    </style:style>
    <style:style style:name="P133" style:parent-style-name="Normale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134" style:parent-style-name="Normale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135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36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37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38" style:parent-style-name="Normale" style:family="paragraph">
      <style:text-properties fo:font-size="14pt" style:font-size-asian="14pt" style:font-size-complex="14pt"/>
    </style:style>
    <style:style style:name="P139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40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41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42" style:parent-style-name="Normale" style:family="paragraph">
      <style:paragraph-properties fo:margin-left="0.983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43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44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45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46" style:parent-style-name="Normale" style:family="paragraph">
      <style:text-properties fo:font-size="14pt" style:font-size-asian="14pt" style:font-size-complex="14pt"/>
    </style:style>
    <style:style style:name="P14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48" style:parent-style-name="Paragrafoelenco" style:list-style-name="LFO19" style:family="paragraph">
      <style:text-properties fo:font-size="14pt" style:font-size-asian="14pt" style:font-size-complex="14pt"/>
    </style:style>
    <style:style style:name="P149" style:parent-style-name="Normale" style:family="paragraph">
      <style:paragraph-properties fo:margin-left="0.4916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0" style:parent-style-name="Paragrafoelenco" style:list-style-name="LFO30" style:family="paragraph"/>
    <style:style style:name="T151" style:parent-style-name="Car.predefinitoparagrafo" style:family="text">
      <style:text-properties fo:font-size="14pt" style:font-size-asian="14pt" style:font-size-complex="14pt"/>
    </style:style>
    <style:style style:name="P152" style:parent-style-name="Paragrafoelenco" style:list-style-name="LFO30" style:family="paragraph"/>
    <style:style style:name="T153" style:parent-style-name="Car.predefinitoparagrafo" style:family="text">
      <style:text-properties fo:font-size="14pt" style:font-size-asian="14pt" style:font-size-complex="14pt"/>
    </style:style>
    <style:style style:name="T154" style:parent-style-name="Car.predefinitoparagrafo" style:family="text">
      <style:text-properties fo:font-size="14pt" style:font-size-asian="14pt" style:font-size-complex="14pt"/>
    </style:style>
    <style:style style:name="T155" style:parent-style-name="Car.predefinitoparagrafo" style:family="text">
      <style:text-properties fo:font-size="14pt" style:font-size-asian="14pt" style:font-size-complex="14pt"/>
    </style:style>
    <style:style style:name="P156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7" style:parent-style-name="Paragrafoelenco" style:list-style-name="LFO31" style:family="paragraph">
      <style:text-properties fo:font-size="14pt" style:font-size-asian="14pt" style:font-size-complex="14pt"/>
    </style:style>
    <style:style style:name="P158" style:parent-style-name="Paragrafoelenco" style:list-style-name="LFO31" style:family="paragraph">
      <style:text-properties fo:font-size="14pt" style:font-size-asian="14pt" style:font-size-complex="14pt"/>
    </style:style>
    <style:style style:name="P159" style:parent-style-name="Normale" style:family="paragraph">
      <style:paragraph-properties fo:margin-left="2.86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60" style:parent-style-name="Paragrafoelenco" style:list-style-name="LFO32" style:family="paragraph">
      <style:text-properties fo:font-size="14pt" style:font-size-asian="14pt" style:font-size-complex="14pt"/>
    </style:style>
    <style:style style:name="P161" style:parent-style-name="Paragrafoelenco" style:list-style-name="LFO31" style:family="paragraph">
      <style:text-properties fo:font-size="14pt" style:font-size-asian="14pt" style:font-size-complex="14pt"/>
    </style:style>
    <style:style style:name="P162" style:parent-style-name="Paragrafoelenco" style:list-style-name="LFO31" style:family="paragraph">
      <style:text-properties fo:font-size="14pt" style:font-size-asian="14pt" style:font-size-complex="14pt"/>
    </style:style>
    <style:style style:name="P163" style:parent-style-name="Paragrafoelenco" style:list-style-name="LFO31" style:family="paragraph">
      <style:text-properties fo:font-size="14pt" style:font-size-asian="14pt" style:font-size-complex="14pt"/>
    </style:style>
    <style:style style:name="P164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65" style:parent-style-name="Paragrafoelenco" style:list-style-name="LFO34" style:family="paragraph">
      <style:text-properties fo:font-size="14pt" style:font-size-asian="14pt" style:font-size-complex="14pt"/>
    </style:style>
    <style:style style:name="P166" style:parent-style-name="Paragrafoelenco" style:list-style-name="LFO34" style:family="paragraph">
      <style:text-properties fo:font-size="14pt" style:font-size-asian="14pt" style:font-size-complex="14pt"/>
    </style:style>
    <style:style style:name="P167" style:parent-style-name="Paragrafoelenco" style:list-style-name="LFO34" style:family="paragraph">
      <style:text-properties fo:font-size="14pt" style:font-size-asian="14pt" style:font-size-complex="14pt"/>
    </style:style>
    <style:style style:name="P168" style:parent-style-name="Normale" style:family="paragraph">
      <style:paragraph-properties fo:margin-left="1.966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69" style:parent-style-name="Paragrafoelenco" style:list-style-name="LFO33" style:family="paragraph">
      <style:text-properties fo:font-size="14pt" style:font-size-asian="14pt" style:font-size-complex="14pt"/>
    </style:style>
    <style:style style:name="P170" style:parent-style-name="Paragrafoelenco" style:list-style-name="LFO33" style:family="paragraph">
      <style:text-properties fo:font-size="14pt" style:font-size-asian="14pt" style:font-size-complex="14pt"/>
    </style:style>
    <style:style style:name="P171" style:parent-style-name="Paragrafoelenco" style:list-style-name="LFO33" style:family="paragraph">
      <style:text-properties fo:font-size="14pt" style:font-size-asian="14pt" style:font-size-complex="14pt"/>
    </style:style>
    <style:style style:name="P172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73" style:parent-style-name="Paragrafoelenco" style:list-style-name="LFO38" style:family="paragraph">
      <style:text-properties fo:font-size="14pt" style:font-size-asian="14pt" style:font-size-complex="14pt"/>
    </style:style>
    <style:style style:name="P174" style:parent-style-name="Paragrafoelenco" style:list-style-name="LFO38" style:family="paragraph">
      <style:text-properties fo:font-size="14pt" style:font-size-asian="14pt" style:font-size-complex="14pt"/>
    </style:style>
    <style:style style:name="P175" style:parent-style-name="Paragrafoelenco" style:list-style-name="LFO38" style:family="paragraph">
      <style:text-properties fo:font-size="14pt" style:font-size-asian="14pt" style:font-size-complex="14pt"/>
    </style:style>
    <style:style style:name="P17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77" style:parent-style-name="Paragrafoelenco" style:list-style-name="LFO20" style:family="paragraph">
      <style:text-properties fo:font-size="14pt" style:font-size-asian="14pt" style:font-size-complex="14pt"/>
    </style:style>
    <style:style style:name="P178" style:parent-style-name="Paragrafoelenco" style:list-style-name="LFO20" style:family="paragraph">
      <style:text-properties fo:font-size="14pt" style:font-size-asian="14pt" style:font-size-complex="14pt"/>
    </style:style>
    <style:style style:name="P179" style:parent-style-name="Paragrafoelenco" style:list-style-name="LFO20" style:family="paragraph">
      <style:text-properties fo:font-size="14pt" style:font-size-asian="14pt" style:font-size-complex="14pt"/>
    </style:style>
    <style:style style:name="P180" style:parent-style-name="Normale" style:family="paragraph">
      <style:text-properties fo:font-size="14pt" style:font-size-asian="14pt" style:font-size-complex="14pt"/>
    </style:style>
    <style:style style:name="T18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2" style:parent-style-name="Car.predefinitoparagrafo" style:family="text">
      <style:text-properties fo:font-size="14pt" style:font-size-asian="14pt" style:font-size-complex="14pt"/>
    </style:style>
    <style:style style:name="T183" style:parent-style-name="Car.predefinitoparagrafo" style:family="text">
      <style:text-properties fo:font-size="14pt" style:font-size-asian="14pt" style:font-size-complex="14pt"/>
    </style:style>
    <style:style style:name="P184" style:parent-style-name="Normale" style:family="paragraph">
      <style:text-properties fo:font-size="14pt" style:font-size-asian="14pt" style:font-size-complex="14pt"/>
    </style:style>
    <style:style style:name="P18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18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7" style:parent-style-name="Car.predefinitoparagrafo" style:family="text">
      <style:text-properties fo:font-size="14pt" style:font-size-asian="14pt" style:font-size-complex="14pt"/>
    </style:style>
    <style:style style:name="T18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9" style:parent-style-name="Car.predefinitoparagrafo" style:family="text">
      <style:text-properties fo:font-size="14pt" style:font-size-asian="14pt" style:font-size-complex="14pt"/>
    </style:style>
    <style:style style:name="T19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1" style:parent-style-name="Car.predefinitoparagrafo" style:family="text">
      <style:text-properties fo:font-size="14pt" style:font-size-asian="14pt" style:font-size-complex="14pt"/>
    </style:style>
    <style:style style:name="T19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193" style:parent-style-name="Paragrafoelenco" style:list-style-name="LFO21" style:family="paragraph"/>
    <style:style style:name="T19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5" style:parent-style-name="Car.predefinitoparagrafo" style:family="text">
      <style:text-properties fo:font-size="14pt" style:font-size-asian="14pt" style:font-size-complex="14pt"/>
    </style:style>
    <style:style style:name="P196" style:parent-style-name="Paragrafoelenco" style:list-style-name="LFO21" style:family="paragraph"/>
    <style:style style:name="T19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8" style:parent-style-name="Car.predefinitoparagrafo" style:family="text">
      <style:text-properties fo:font-size="14pt" style:font-size-asian="14pt" style:font-size-complex="14pt"/>
    </style:style>
    <style:style style:name="T199" style:parent-style-name="Car.predefinitoparagrafo" style:family="text">
      <style:text-properties fo:color="#000000" fo:font-size="14pt" style:font-size-asian="14pt" style:font-size-complex="14pt"/>
    </style:style>
    <style:style style:name="P200" style:parent-style-name="Paragrafoelenco" style:list-style-name="LFO21" style:family="paragraph"/>
    <style:style style:name="T20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02" style:parent-style-name="Car.predefinitoparagrafo" style:family="text">
      <style:text-properties fo:font-size="14pt" style:font-size-asian="14pt" style:font-size-complex="14pt"/>
    </style:style>
    <style:style style:name="T203" style:parent-style-name="Car.predefinitoparagrafo" style:family="text">
      <style:text-properties fo:color="#000000" fo:font-size="14pt" style:font-size-asian="14pt" style:font-size-complex="14pt"/>
    </style:style>
    <style:style style:name="T20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05" style:parent-style-name="Car.predefinitoparagrafo" style:family="text">
      <style:text-properties fo:font-size="14pt" style:font-size-asian="14pt" style:font-size-complex="14pt"/>
    </style:style>
    <style:style style:name="P206" style:parent-style-name="Paragrafoelenco" style:list-style-name="LFO22" style:family="paragraph">
      <style:text-properties fo:font-size="14pt" style:font-size-asian="14pt" style:font-size-complex="14pt"/>
    </style:style>
    <style:style style:name="P207" style:parent-style-name="Paragrafoelenco" style:list-style-name="LFO22" style:family="paragraph"/>
    <style:style style:name="T208" style:parent-style-name="Car.predefinitoparagrafo" style:family="text">
      <style:text-properties fo:font-size="14pt" style:font-size-asian="14pt" style:font-size-complex="14pt"/>
    </style:style>
    <style:style style:name="T20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10" style:parent-style-name="Car.predefinitoparagrafo" style:family="text">
      <style:text-properties fo:font-size="14pt" style:font-size-asian="14pt" style:font-size-complex="14pt"/>
    </style:style>
    <style:style style:name="P211" style:parent-style-name="Paragrafoelenco" style:list-style-name="LFO23" style:family="paragraph">
      <style:text-properties fo:font-size="14pt" style:font-size-asian="14pt" style:font-size-complex="14pt"/>
    </style:style>
    <style:style style:name="P212" style:parent-style-name="Paragrafoelenco" style:list-style-name="LFO23" style:family="paragraph"/>
    <style:style style:name="T213" style:parent-style-name="Car.predefinitoparagrafo" style:family="text">
      <style:text-properties fo:font-size="14pt" style:font-size-asian="14pt" style:font-size-complex="14pt"/>
    </style:style>
    <style:style style:name="T214" style:parent-style-name="Car.predefinitoparagrafo" style:family="text">
      <style:text-properties fo:color="#000000" fo:font-size="14pt" style:font-size-asian="14pt" style:font-size-complex="14pt"/>
    </style:style>
    <style:style style:name="T215" style:parent-style-name="Car.predefinitoparagrafo" style:family="text">
      <style:text-properties fo:font-size="14pt" style:font-size-asian="14pt" style:font-size-complex="14pt"/>
    </style:style>
    <style:style style:name="T216" style:parent-style-name="Car.predefinitoparagrafo" style:family="text">
      <style:text-properties fo:color="#000000" fo:font-size="14pt" style:font-size-asian="14pt" style:font-size-complex="14pt"/>
    </style:style>
    <style:style style:name="T217" style:parent-style-name="Car.predefinitoparagrafo" style:family="text">
      <style:text-properties fo:font-size="14pt" style:font-size-asian="14pt" style:font-size-complex="14pt"/>
    </style:style>
    <style:style style:name="P218" style:parent-style-name="Normale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19" style:parent-style-name="Normale" style:family="paragraph">
      <style:text-properties fo:font-size="14pt" style:font-size-asian="14pt" style:font-size-complex="14pt"/>
    </style:style>
    <style:style style:name="P220" style:parent-style-name="Normale" style:family="paragraph">
      <style:text-properties fo:font-size="14pt" style:font-size-asian="14pt" style:font-size-complex="14pt"/>
    </style:style>
    <style:style style:name="P221" style:parent-style-name="Normale" style:family="paragraph">
      <style:text-properties fo:font-size="14pt" style:font-size-asian="14pt" style:font-size-complex="14pt"/>
    </style:style>
    <style:style style:name="P222" style:parent-style-name="Normale" style:family="paragraph">
      <style:text-properties fo:font-size="14pt" style:font-size-asian="14pt" style:font-size-complex="14pt"/>
    </style:style>
    <style:style style:name="T223" style:parent-style-name="Car.predefinitoparagrafo" style:family="text">
      <style:text-properties fo:font-size="14pt" style:font-size-asian="14pt" style:font-size-complex="14pt"/>
    </style:style>
    <style:style style:name="T224" style:parent-style-name="Car.predefinitoparagrafo" style:family="text">
      <style:text-properties fo:color="#000000" fo:font-size="14pt" style:font-size-asian="14pt" style:font-size-complex="14pt"/>
    </style:style>
    <style:style style:name="T225" style:parent-style-name="Car.predefinitoparagrafo" style:family="text">
      <style:text-properties fo:font-size="14pt" style:font-size-asian="14pt" style:font-size-complex="14pt"/>
    </style:style>
    <style:style style:name="T226" style:parent-style-name="Car.predefinitoparagrafo" style:family="text">
      <style:text-properties fo:font-size="14pt" style:font-size-asian="14pt" style:font-size-complex="14pt"/>
    </style:style>
    <style:style style:name="T227" style:parent-style-name="Car.predefinitoparagrafo" style:family="text">
      <style:text-properties fo:color="#000000" fo:font-size="14pt" style:font-size-asian="14pt" style:font-size-complex="14pt"/>
    </style:style>
    <style:style style:name="T228" style:parent-style-name="Car.predefinitoparagrafo" style:family="text">
      <style:text-properties fo:font-size="14pt" style:font-size-asian="14pt" style:font-size-complex="14pt"/>
    </style:style>
    <style:style style:name="P229" style:parent-style-name="Normale" style:family="paragraph">
      <style:text-properties fo:font-size="14pt" style:font-size-asian="14pt" style:font-size-complex="14pt"/>
    </style:style>
    <style:style style:name="P230" style:parent-style-name="Normale" style:family="paragraph">
      <style:text-properties fo:font-size="14pt" style:font-size-asian="14pt" style:font-size-complex="14pt"/>
    </style:style>
    <style:style style:name="P231" style:parent-style-name="Normale" style:family="paragraph">
      <style:text-properties fo:font-size="14pt" style:font-size-asian="14pt" style:font-size-complex="14pt"/>
    </style:style>
    <style:style style:name="P23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23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34" style:parent-style-name="Car.predefinitoparagrafo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3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36" style:parent-style-name="Normale" style:family="paragraph">
      <style:text-properties fo:font-size="14pt" style:font-size-asian="14pt" style:font-size-complex="14pt"/>
    </style:style>
    <style:style style:name="P23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38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239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240" style:parent-style-name="Paragrafoelenco" style:family="paragraph">
      <style:text-properties fo:font-size="14pt" style:font-size-asian="14pt" style:font-size-complex="14pt"/>
    </style:style>
    <style:style style:name="P241" style:parent-style-name="Paragrafoelenco" style:family="paragraph">
      <style:text-properties fo:font-size="14pt" style:font-size-asian="14pt" style:font-size-complex="14pt"/>
    </style:style>
    <style:style style:name="T242" style:parent-style-name="Car.predefinitoparagrafo" style:family="text">
      <style:text-properties fo:font-size="14pt" style:font-size-asian="14pt" style:font-size-complex="14pt"/>
    </style:style>
    <style:style style:name="T24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44" style:parent-style-name="Paragrafoelenco" style:family="paragraph">
      <style:text-properties fo:font-size="14pt" style:font-size-asian="14pt" style:font-size-complex="14pt"/>
    </style:style>
    <style:style style:name="P245" style:parent-style-name="Paragrafoelenco" style:family="paragraph">
      <style:text-properties fo:font-size="14pt" style:font-size-asian="14pt" style:font-size-complex="14pt"/>
    </style:style>
    <style:style style:name="T246" style:parent-style-name="Car.predefinitoparagrafo" style:family="text">
      <style:text-properties fo:font-size="14pt" style:font-size-asian="14pt" style:font-size-complex="14pt"/>
    </style:style>
    <style:style style:name="T247" style:parent-style-name="Car.predefinitoparagrafo" style:family="text">
      <style:text-properties fo:font-size="14pt" style:font-size-asian="14pt" style:font-size-complex="14pt"/>
    </style:style>
    <style:style style:name="T248" style:parent-style-name="Car.predefinitoparagrafo" style:family="text">
      <style:text-properties fo:font-size="14pt" style:font-size-asian="14pt" style:font-size-complex="14pt"/>
    </style:style>
    <style:style style:name="T24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50" style:parent-style-name="Paragrafoelenco" style:family="paragraph">
      <style:paragraph-properties fo:margin-left="2.4583in">
        <style:tab-stops/>
      </style:paragraph-properties>
      <style:text-properties fo:font-size="14pt" style:font-size-asian="14pt" style:font-size-complex="14pt"/>
    </style:style>
    <style:style style:name="P251" style:parent-style-name="Paragrafoelenco" style:family="paragraph">
      <style:text-properties fo:font-size="14pt" style:font-size-asian="14pt" style:font-size-complex="14pt"/>
    </style:style>
    <style:style style:name="P252" style:parent-style-name="Paragrafoelenco" style:family="paragraph">
      <style:text-properties fo:font-size="14pt" style:font-size-asian="14pt" style:font-size-complex="14pt"/>
    </style:style>
    <style:style style:name="T253" style:parent-style-name="Car.predefinitoparagrafo" style:family="text">
      <style:text-properties fo:font-size="14pt" style:font-size-asian="14pt" style:font-size-complex="14pt"/>
    </style:style>
    <style:style style:name="T25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55" style:parent-style-name="Paragrafoelenco" style:family="paragraph">
      <style:text-properties fo:font-size="14pt" style:font-size-asian="14pt" style:font-size-complex="14pt"/>
    </style:style>
    <style:style style:name="P256" style:parent-style-name="Paragrafoelenco" style:family="paragraph">
      <style:text-properties fo:font-size="14pt" style:font-size-asian="14pt" style:font-size-complex="14pt"/>
    </style:style>
    <style:style style:name="T257" style:parent-style-name="Car.predefinitoparagrafo" style:family="text">
      <style:text-properties fo:font-size="14pt" style:font-size-asian="14pt" style:font-size-complex="14pt"/>
    </style:style>
    <style:style style:name="T258" style:parent-style-name="Car.predefinitoparagrafo" style:family="text">
      <style:text-properties fo:font-size="14pt" style:font-size-asian="14pt" style:font-size-complex="14pt"/>
    </style:style>
    <style:style style:name="T259" style:parent-style-name="Car.predefinitoparagrafo" style:family="text">
      <style:text-properties fo:font-size="14pt" style:font-size-asian="14pt" style:font-size-complex="14pt"/>
    </style:style>
    <style:style style:name="T26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61" style:parent-style-name="Paragrafoelenco" style:family="paragraph">
      <style:paragraph-properties fo:margin-left="2.4583in">
        <style:tab-stops/>
      </style:paragraph-properties>
      <style:text-properties fo:font-size="14pt" style:font-size-asian="14pt" style:font-size-complex="14pt"/>
    </style:style>
    <style:style style:name="P262" style:parent-style-name="Paragrafoelenco" style:family="paragraph">
      <style:paragraph-properties fo:margin-left="1.475in">
        <style:tab-stops/>
      </style:paragraph-properties>
      <style:text-properties fo:font-size="14pt" style:font-size-asian="14pt" style:font-size-complex="14pt"/>
    </style:style>
    <style:style style:name="P263" style:parent-style-name="Paragrafoelenco" style:family="paragraph">
      <style:text-properties fo:font-size="14pt" style:font-size-asian="14pt" style:font-size-complex="14pt"/>
    </style:style>
    <style:style style:name="P26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65" style:parent-style-name="Paragrafoelenco" style:list-style-name="LFO27" style:family="paragraph">
      <style:text-properties fo:font-size="14pt" style:font-size-asian="14pt" style:font-size-complex="14pt"/>
    </style:style>
    <style:style style:name="P266" style:parent-style-name="Paragrafoelenco" style:list-style-name="LFO27" style:family="paragraph">
      <style:text-properties fo:font-size="14pt" style:font-size-asian="14pt" style:font-size-complex="14pt"/>
    </style:style>
    <style:style style:name="P26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68" style:parent-style-name="Paragrafoelenco" style:list-style-name="LFO28" style:family="paragraph">
      <style:text-properties fo:font-size="14pt" style:font-size-asian="14pt" style:font-size-complex="14pt"/>
    </style:style>
    <style:style style:name="P269" style:parent-style-name="Paragrafoelenco" style:list-style-name="LFO28" style:family="paragraph">
      <style:text-properties fo:font-size="14pt" style:font-size-asian="14pt" style:font-size-complex="14pt"/>
    </style:style>
    <style:style style:name="P270" style:parent-style-name="Normale" style:family="paragraph">
      <style:paragraph-properties fo:margin-left="1.2416in">
        <style:tab-stops/>
      </style:paragraph-properties>
    </style:style>
    <style:style style:name="T27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5" style:parent-style-name="Car.predefinitoparagrafo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76" style:parent-style-name="Car.predefinitoparagrafo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77" style:parent-style-name="Paragrafoelenco" style:list-style-name="LFO29" style:family="paragraph">
      <style:text-properties fo:color="#000000" fo:font-size="14pt" style:font-size-asian="14pt" style:font-size-complex="14pt"/>
    </style:style>
    <style:style style:name="P278" style:parent-style-name="Paragrafoelenco" style:list-style-name="LFO28" style:family="paragraph">
      <style:text-properties fo:font-size="14pt" style:font-size-asian="14pt" style:font-size-complex="14pt"/>
    </style:style>
    <style:style style:name="P279" style:parent-style-name="Paragrafoelenco" style:list-style-name="LFO28" style:family="paragraph">
      <style:text-properties fo:font-size="14pt" style:font-size-asian="14pt" style:font-size-complex="14pt"/>
    </style:style>
    <style:style style:name="P280" style:parent-style-name="Normale" style:family="paragraph">
      <style:paragraph-properties fo:margin-left="0.4916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81" style:parent-style-name="Paragrafoelenco" style:list-style-name="LFO35" style:family="paragraph">
      <style:text-properties fo:font-size="14pt" style:font-size-asian="14pt" style:font-size-complex="14pt"/>
    </style:style>
    <style:style style:name="P282" style:parent-style-name="Paragrafoelenco" style:list-style-name="LFO35" style:family="paragraph">
      <style:text-properties fo:font-size="14pt" style:font-size-asian="14pt" style:font-size-complex="14pt"/>
    </style:style>
    <style:style style:name="P283" style:parent-style-name="Normale" style:family="paragraph">
      <style:paragraph-properties fo:margin-left="1.733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84" style:parent-style-name="Paragrafoelenco" style:list-style-name="LFO36" style:family="paragraph">
      <style:text-properties fo:font-size="14pt" style:font-size-asian="14pt" style:font-size-complex="14pt"/>
    </style:style>
    <style:style style:name="P285" style:parent-style-name="Paragrafoelenco" style:list-style-name="LFO35" style:family="paragraph">
      <style:text-properties fo:font-size="14pt" style:font-size-asian="14pt" style:font-size-complex="14pt"/>
    </style:style>
    <style:style style:name="P286" style:parent-style-name="Paragrafoelenco" style:list-style-name="LFO35" style:family="paragraph">
      <style:text-properties fo:font-size="14pt" style:font-size-asian="14pt" style:font-size-complex="14pt"/>
    </style:style>
    <style:style style:name="P287" style:parent-style-name="Normale" style:family="paragraph">
      <style:paragraph-properties fo:margin-left="0.983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88" style:parent-style-name="Paragrafoelenco" style:list-style-name="LFO37" style:family="paragraph">
      <style:text-properties fo:font-size="14pt" style:font-size-asian="14pt" style:font-size-complex="14pt"/>
    </style:style>
    <style:style style:name="P289" style:parent-style-name="Normale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90" style:parent-style-name="Normale" style:family="paragraph">
      <style:text-properties fo:font-size="14pt" style:font-size-asian="14pt" style:font-size-complex="14pt"/>
    </style:style>
    <style:style style:name="P291" style:parent-style-name="Paragrafoelenco" style:family="paragraph">
      <style:text-properties fo:font-size="14pt" style:font-size-asian="14pt" style:font-size-complex="14pt"/>
    </style:style>
    <style:style style:name="T29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5" style:parent-style-name="Car.predefinitoparagrafo" style:family="text">
      <style:text-properties fo:font-size="14pt" style:font-size-asian="14pt" style:font-size-complex="14pt"/>
    </style:style>
    <style:style style:name="T29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7" style:parent-style-name="Car.predefinitoparagrafo" style:family="text">
      <style:text-properties fo:font-size="14pt" style:font-size-asian="14pt" style:font-size-complex="14pt"/>
    </style:style>
    <style:style style:name="T29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9" style:parent-style-name="Car.predefinitoparagrafo" style:family="text">
      <style:text-properties fo:font-size="14pt" style:font-size-asian="14pt" style:font-size-complex="14pt"/>
    </style:style>
    <style:style style:name="T30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301" style:parent-style-name="Paragrafoelenco" style:list-style-name="LFO24" style:family="paragraph"/>
    <style:style style:name="T30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03" style:parent-style-name="Car.predefinitoparagrafo" style:family="text">
      <style:text-properties fo:font-size="14pt" style:font-size-asian="14pt" style:font-size-complex="14pt"/>
    </style:style>
    <style:style style:name="P304" style:parent-style-name="Paragrafoelenco" style:list-style-name="LFO24" style:family="paragraph"/>
    <style:style style:name="T30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06" style:parent-style-name="Car.predefinitoparagrafo" style:family="text">
      <style:text-properties fo:font-size="14pt" style:font-size-asian="14pt" style:font-size-complex="14pt"/>
    </style:style>
    <style:style style:name="T30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08" style:parent-style-name="Car.predefinitoparagrafo" style:family="text">
      <style:text-properties fo:font-size="14pt" style:font-size-asian="14pt" style:font-size-complex="14pt"/>
    </style:style>
    <style:style style:name="T30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10" style:parent-style-name="Car.predefinitoparagrafo" style:family="text">
      <style:text-properties fo:font-size="14pt" style:font-size-asian="14pt" style:font-size-complex="14pt"/>
    </style:style>
    <style:style style:name="P311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12" style:parent-style-name="Normale" style:family="paragraph">
      <style:text-properties fo:font-size="14pt" style:font-size-asian="14pt" style:font-size-complex="14pt"/>
    </style:style>
    <style:style style:name="P313" style:parent-style-name="Normale" style:family="paragraph">
      <style:text-properties fo:font-size="14pt" style:font-size-asian="14pt" style:font-size-complex="14pt"/>
    </style:style>
    <style:style style:name="P314" style:parent-style-name="Normale" style:family="paragraph">
      <style:text-properties fo:font-size="14pt" style:font-size-asian="14pt" style:font-size-complex="14pt"/>
    </style:style>
    <style:style style:name="T315" style:parent-style-name="Car.predefinitoparagrafo" style:family="text">
      <style:text-properties fo:font-size="14pt" style:font-size-asian="14pt" style:font-size-complex="14pt"/>
    </style:style>
    <style:style style:name="T316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17" style:parent-style-name="Car.predefinitoparagrafo" style:family="text">
      <style:text-properties fo:font-size="14pt" style:font-size-asian="14pt" style:font-size-complex="14pt"/>
    </style:style>
    <style:style style:name="P318" style:parent-style-name="Normale" style:family="paragraph">
      <style:text-properties fo:font-size="14pt" style:font-size-asian="14pt" style:font-size-complex="14pt"/>
    </style:style>
    <style:style style:name="P319" style:parent-style-name="Normale" style:family="paragraph">
      <style:text-properties fo:font-size="14pt" style:font-size-asian="14pt" style:font-size-complex="14pt"/>
    </style:style>
    <style:style style:name="P320" style:parent-style-name="Normale" style:family="paragraph">
      <style:text-properties fo:font-size="14pt" style:font-size-asian="14pt" style:font-size-complex="14pt"/>
    </style:style>
    <style:style style:name="P321" style:parent-style-name="Normale" style:family="paragraph">
      <style:text-properties fo:font-size="14pt" style:font-size-asian="14pt" style:font-size-complex="14pt"/>
    </style:style>
    <style:style style:name="P322" style:parent-style-name="Normale" style:family="paragraph">
      <style:text-properties fo:font-size="14pt" style:font-size-asian="14pt" style:font-size-complex="14pt"/>
    </style:style>
    <style:style style:name="P323" style:parent-style-name="Normale" style:family="paragraph">
      <style:text-properties fo:font-size="14pt" style:font-size-asian="14pt" style:font-size-complex="14pt"/>
    </style:style>
    <style:style style:name="P32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2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26" style:parent-style-name="Paragrafoelenco" style:list-style-name="LFO25" style:family="paragraph">
      <style:text-properties fo:font-size="14pt" style:font-size-asian="14pt" style:font-size-complex="14pt"/>
    </style:style>
    <style:style style:name="P327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328" style:parent-style-name="Normale" style:family="paragraph">
      <style:paragraph-properties fo:text-indent="0.4916in"/>
      <style:text-properties fo:font-weight="bold" style:font-weight-asian="bold" style:font-weight-complex="bold" fo:font-size="14pt" style:font-size-asian="14pt" style:font-size-complex="14pt"/>
    </style:style>
    <style:style style:name="P329" style:parent-style-name="Paragrafoelenco" style:list-style-name="LFO26" style:family="paragraph">
      <style:text-properties fo:font-size="14pt" style:font-size-asian="14pt" style:font-size-complex="14pt"/>
    </style:style>
    <style:style style:name="P330" style:parent-style-name="Normale" style:family="paragraph">
      <style:text-properties fo:font-size="14pt" style:font-size-asian="14pt" style:font-size-complex="14pt"/>
    </style:style>
    <style:style style:name="T331" style:parent-style-name="Car.predefinitoparagrafo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1.Analisi dei requisiti utente</text:span></text:p>
      <text:p text:style-name="Normale"><text:span text:style-name="T3">1.1 Descrizione generale</text:span></text:p>
      <text:p text:style-name="Normale"><text:span text:style-name="T4">SimpleArt</text:span><text:span text:style-name="T5"><text:s/>è un software che permette agli artisti di creare, modificare e condividere la propria arte col resto del mondo. L’applicazione, per essere utilizzata richiede all’utente di registrarsi.</text:span></text:p>
      <text:p text:style-name="Normale"><text:span text:style-name="T6">Una volta effettuato l’accesso, ogni utente potrà spostarsi tra una home dove appariranno le opere degli artisti seguiti presenti nella sua lista<text:s/></text:span><text:span text:style-name="T7">“</text:span><text:span text:style-name="T8">Nel</text:span><text:span text:style-name="T9"><text:s/>cuore”,<text:s/></text:span><text:span text:style-name="T10">una sezione esplora dove potrà cercare profili specifici di altri artisti, visitarne i profili, aggiungerli alla propria lista “Nel cuore”, visualizzarne la galleria d’arte ed eventualmente scaricarne le opere, potrà oppure accedere al proprio profilo e visualizzare la sua galleria e quali sono gli artisti che attualmente segue.</text:span></text:p>
      <text:p text:style-name="P11">L’applicazione mostrerà all’utente anche opere di artisti non presenti nella sua lista dei seguiti, così da fargli scoprire nuovi profili che eventualmente potrà scegliere di iniziare a seguire.</text:p>
      <text:p text:style-name="P12">La vera particolarità di Simple Art è che mette a disposizione dell’utente una lavagna virtuale su cui poter disegnare le proprie opere d’arte.<text:s/></text:p>
      <text:p text:style-name="P13">Una volta terminata l’opera, sarà possibile inserirla nella propria galleria d’arte e renderla visibile a tutti i propri follower.</text:p>
      <text:p text:style-name="P14">L’utente avrà la facoltà in ogni momento di modificare i dati all’interno del proprio profilo e di eliminare oppure rendere momentaneamente invisibili le opere inserite nella propria galleria.</text:p>
      <text:p text:style-name="Normale"> </text:p>
      <text:p text:style-name="Normale"> 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<text:span text:style-name="T15">2. Analisi dei requisiti del sistema</text:span></text:p>
      <text:p text:style-name="Normale"><text:span text:style-name="T16">2.1 Diagramma dei casi d’uso</text:span></text:p>
      <text:p text:style-name="Normale"> </text:p>
      <text:p text:style-name="Normale"> </text:p>
      <text:p text:style-name="Normale"><draw:frame draw:style-name="a0" draw:name="Immagine 2" text:anchor-type="as-char" svg:x="0in" svg:y="0in" svg:width="6.69167in" svg:height="5.03333in" style:rel-width="scale" style:rel-height="scale"><draw:image xlink:href="media/image1.jpeg" xlink:type="simple" xlink:show="embed" xlink:actuate="onLoad"/><svg:title/><svg:desc>Immagine che contiene diagramma, linea, cerchio, schizzo

Il contenuto generato dall'IA potrebbe non essere corretto.</svg:desc></draw:frame></text:p>
      <text:p text:style-name="Normale"><text:span text:style-name="T17"> </text:span></text:p>
      <text:p text:style-name="Normale"><text:span text:style-name="T18"> </text:span></text:p>
      <text:p text:style-name="Normale"><text:span text:style-name="T19"> </text:span></text:p>
      <text:p text:style-name="Normale"><text:span text:style-name="T20"> </text:span></text:p>
      <text:p text:style-name="Normale"><text:span text:style-name="T21"> </text:span></text:p>
      <text:p text:style-name="P22"> </text:p>
      <text:p text:style-name="P23"/>
      <text:p text:style-name="P24"/>
      <text:p text:style-name="Normale"/>
      <text:soft-page-break/>
      <text:p text:style-name="Normale"><text:span text:style-name="T25">2.2 Casi d’uso</text:span></text:p>
      <text:p text:style-name="Normale"><text:span text:style-name="T26">2.2.1 Registrazione utente.</text:span></text:p>
      <text:p text:style-name="Normale"><text:span text:style-name="T27">Portata:</text:span><text:span text:style-name="T28"><text:s/>Piattaforma di creazione e condivisione d’arte.</text:span></text:p>
      <text:p text:style-name="Normale"><text:span text:style-name="T29">Livello:</text:span><text:span text:style-name="T30"><text:s/>Obiettivo utente.</text:span></text:p>
      <text:p text:style-name="Normale"><text:span text:style-name="T31">Attore primario:</text:span><text:span text:style-name="T32"><text:s/>Utente e amministratore.</text:span></text:p>
      <text:p text:style-name="Normale"><text:span text:style-name="T33">Parti interessate e interessi:</text:span></text:p>
      <text:p text:style-name="Normale"><text:span text:style-name="T34">• Utente:</text:span><text:span text:style-name="T35"><text:s/>Vuole registrarsi o accedere alla piattaforma.</text:span></text:p>
      <text:p text:style-name="Normale"><text:span text:style-name="T36">• Amministratore:</text:span><text:span text:style-name="T37"><text:s/>Vuole accedere all’interno della piattaforma.</text:span></text:p>
      <text:p text:style-name="Normale"><text:span text:style-name="T38">• Sistema:</text:span><text:span text:style-name="T39"><text:s/>vuole verificare che l’utente, o l’amministratore, sia registrato alla piattaforma e gestirne l’accesso e i privilegi.</text:span></text:p>
      <text:p text:style-name="Normale"><text:span text:style-name="T40">Pre-condizioni:</text:span><text:span text:style-name="T41"><text:s/>nessuna.</text:span></text:p>
      <text:p text:style-name="Normale"><text:span text:style-name="T42">Garanzia di successo:</text:span><text:span text:style-name="T43"><text:s/></text:span></text:p>
      <text:p text:style-name="P44">L’utente riesce a registrarsi correttamente.</text:p>
      <text:p text:style-name="P45">L’utente riesce ad entrare correttamente nella piattaforma.</text:p>
      <text:p text:style-name="P46">Scenario principale di successo</text:p>
      <text:list text:style-name="LFO14" text:continue-numbering="true">
        <text:list-item>
          <text:p text:style-name="P47">L’utente desidera registrarsi alla piattaforma.</text:p>
        </text:list-item>
        <text:list-item>
          <text:p text:style-name="P48">Il sistema mostra il modulo di registrazione.</text:p>
        </text:list-item>
        <text:list-item>
          <text:p text:style-name="P49">L’utente inserisce dati anagrafici, e-mail e password.</text:p>
        </text:list-item>
        <text:list-item>
          <text:p text:style-name="P50">Il sistema verifica la correttezza e la validità dei dati inseriti.</text:p>
        </text:list-item>
        <text:list-item>
          <text:p text:style-name="P51">Il sistema conferma l’avvenuta registrazione.</text:p>
        </text:list-item>
      </text:list>
      <text:p text:style-name="Normale"/>
      <text:p text:style-name="Normale"/>
      <text:p text:style-name="P52"> </text:p>
      <text:p text:style-name="P53"> </text:p>
      <text:p text:style-name="P54"> </text:p>
      <text:p text:style-name="P55"> </text:p>
      <text:p text:style-name="P56"/>
      <text:p text:style-name="P57"/>
      <text:p text:style-name="Normale"><text:span text:style-name="T58">Flussi alternativi</text:span></text:p>
      <text:p text:style-name="P59">*a. In qualsiasi momento l'utente decide di annullare la procedura di registrazione.</text:p>
      <text:p text:style-name="P60"><text:s text:c="6"/>1. Il sistema annulla la procedura di registrazione.</text:p>
      <text:p text:style-name="Normale"><text:span text:style-name="T61"><text:s text:c="6"/>2. Termina il caso d’uso.</text:span></text:p>
      <text:p text:style-name="P62">1a. L'utente vuole accedere alla piattaforma.</text:p>
      <text:list text:style-name="LFO15" text:continue-numbering="true">
        <text:list-item>
          <text:p text:style-name="P63">Il sistema mostra il modulo d’accesso.</text:p>
        </text:list-item>
        <text:list-item>
          <text:p text:style-name="P64">L’utente compila il modulo d’accesso con utente e password.</text:p>
        </text:list-item>
        <text:list-item>
          <text:p text:style-name="P65"><text:span text:style-name="T66">Il<text:s/></text:span><text:span text:style-name="T67">sistema</text:span><text:span text:style-name="T68"><text:s/>valida le credenziali fornite.</text:span></text:p>
        </text:list-item>
      </text:list>
      <text:p text:style-name="P69"/>
      <text:p text:style-name="P70">3a. Le credenziali fornite non sono valide.</text:p>
      <text:list text:style-name="LFO16" text:continue-numbering="true">
        <text:list-item>
          <text:p text:style-name="P71">Il sistema mostra un messaggio d’errore.</text:p>
        </text:list-item>
      </text:list>
      <text:p text:style-name="P72">2 <text:s text:c="3"/>L’utente ripete i punti 1a 2/3.</text:p>
      <text:p text:style-name="P73">3 <text:s text:c="3"/>L’utente accede alla piattaforma.</text:p>
      <text:p text:style-name="P74">4 <text:s text:c="3"/>Termina il caso d’uso.</text:p>
      <text:p text:style-name="Normale"><text:span text:style-name="T75">4a. Il sistema rileva che i campi obbligatori non sono stati compilati dall'utente.</text:span></text:p>
      <text:p text:style-name="P76">1. Il sistema segnala l'errore.</text:p>
      <text:p text:style-name="P77">2. L'utente svolge il punto 3 del flusso principale fino a che non compila tutti i campi obbligatori.</text:p>
      <text:p text:style-name="Normale"><text:span text:style-name="T78">4b. Il sistema rileva che l’utente ha inserito un nome/ un cognome/ un username o un indirizzo mail non valido.</text:span></text:p>
      <text:p text:style-name="P79">1. Il sistema segnala l'errore informando l'utente sulla corretta scrittura del/dei campi sbagliati.</text:p>
      <text:p text:style-name="P80">2. L'utente svolge il punto 3 del flusso principale finché non inserisce tutti i dati validi.</text:p>
      <text:p text:style-name="Normale"><text:span text:style-name="T81">4c. Il sistema rileva che l’utente ha inserito un username/indirizzo mail già utilizzato per un altro account.</text:span></text:p>
      <text:soft-page-break/>
      <text:p text:style-name="P82">1. Il sistema segnala l’errore all’utente.</text:p>
      <text:p text:style-name="P83">2. L'utente svolge il punto 3 del flusso principale finché non inserisce un username o un indirizzo mail non registrato.</text:p>
      <text:p text:style-name="P84"> </text:p>
      <text:p text:style-name="P85">Requisiti speciali:</text:p>
      <text:list text:style-name="LFO17" text:continue-numbering="true">
        <text:list-item>
          <text:p text:style-name="P86">La password deve essere criptata.</text:p>
        </text:list-item>
        <text:list-item>
          <text:p text:style-name="P87">La password deve contenere almeno 8 caratteri, inclusi una lettera maiuscola, una minuscola, un numero e un carattere speciale.</text:p>
        </text:list-item>
        <text:list-item>
          <text:p text:style-name="P88">La mail deve rispettare il formato username@dominio.provider.<text:s/></text:p>
        </text:list-item>
      </text:list>
      <text:p text:style-name="P89"> </text:p>
      <text:p text:style-name="P90">Elenco delle varianti tecnologiche:</text:p>
      <text:list text:style-name="LFO18" text:continue-numbering="true">
        <text:list-item>
          <text:p text:style-name="P91">Utilizzo di un DBMS per salvare i dati.</text:p>
        </text:list-item>
      </text:list>
      <text:p text:style-name="P92">Frequenza di ripetizione:</text:p>
      <text:p text:style-name="P93">Ogni qualvolta un utente o l’amministratore ha necessità di accedere all’applicazione.</text:p>
      <text:p text:style-name="P94"/>
      <text:p text:style-name="Normale"><text:span text:style-name="T95">2.2.2 Gestione profilo</text:span></text:p>
      <text:p text:style-name="Normale"><text:span text:style-name="T96">Portata:</text:span><text:span text:style-name="T97"><text:s/>Piattaforma di creazione e condivisione d’arte.</text:span></text:p>
      <text:p text:style-name="Normale"><text:span text:style-name="T98">Livello:</text:span><text:span text:style-name="T99"><text:s/>Obiettivo utente.</text:span></text:p>
      <text:p text:style-name="Normale"><text:span text:style-name="T100">Attore primario:</text:span><text:span text:style-name="T101"><text:s/>Utente registrato</text:span></text:p>
      <text:p text:style-name="Normale"><text:span text:style-name="T102">Parti interessate e interessi:</text:span></text:p>
      <text:p text:style-name="P103"><text:span text:style-name="T104">• <text:s text:c="4"/>Utente:</text:span><text:span text:style-name="T105"><text:s/>Vuole personalizzare il proprio profilo, gestire la<text:s/></text:span></text:p>
      <text:p text:style-name="P106">propria galleria d'arte e la lista "Nel cuore" di artisti preferiti.</text:p>
      <text:list text:style-name="LFO18" text:continue-numbering="true">
        <text:list-item>
          <text:p text:style-name="P107"><text:span text:style-name="T108">Sistema:</text:span><text:span text:style-name="T109"><text:s/>Vuole permettere all'utente di modificare i propri dati personali, visualizzare e organizzare le proprie opere, e gestire le relazioni con altri artisti.</text:span></text:p>
        </text:list-item>
      </text:list>
      <text:p text:style-name="P110"/>
      <text:p text:style-name="P111"/>
      <text:soft-page-break/>
      <text:p text:style-name="Normale"><text:span text:style-name="T112">Pre-condizioni:<text:s/></text:span><text:span text:style-name="T113">L'utente deve aver effettuato l'accesso alla piattaforma.</text:span></text:p>
      <text:p text:style-name="Normale"><text:span text:style-name="T114">Garanzia di successo:<text:s/></text:span><text:span text:style-name="T115">L'utente riesce a gestire correttamente il proprio profilo, la galleria d'arte e la lista "Nel cuore”.</text:span></text:p>
      <text:p text:style-name="P116"> </text:p>
      <text:p text:style-name="P117">Scenario principale di successo</text:p>
      <text:p text:style-name="P118">1. L’utente accede al proprio profilo.</text:p>
      <text:p text:style-name="P119">2. Il sistema mostra il profilo completo.</text:p>
      <text:p text:style-name="Normale"><text:span text:style-name="T120">3. L’utente decide cosa visualizzare.</text:span></text:p>
      <text:p text:style-name="P121"/>
      <text:p text:style-name="P122">Flussi alternativi</text:p>
      <text:p text:style-name="P123"><text:s text:c="4"/>*a L’utente in qualsiasi momento sceglie di tornare sul profilo.</text:p>
      <text:p text:style-name="P124"><text:s text:c="4"/>*b L’utente in qualsiasi momento sceglie di andare a cercare altri artisti, <text:s text:c="3"/>visualizzare le opere degli artisti seguiti o andare a creare una nuova opera.</text:p>
      <text:p text:style-name="P125"><text:s text:c="4"/>*c L’utente in qualsiasi momento sceglie di fare log-out.</text:p>
      <text:p text:style-name="P126"> </text:p>
      <text:p text:style-name="P127">3a. L'utente sceglie l'opzione di modifica profilo.</text:p>
      <text:p text:style-name="P128">1 Il sistema mostra il modulo di modifica.</text:p>
      <text:p text:style-name="P129">2 L’utente modifica uno o più campi (nickname, foto profilo, descrizione).</text:p>
      <text:p text:style-name="P130">3 L’utente conferma le modifiche.</text:p>
      <text:p text:style-name="P131">4 Il sistema verifica la validità dei dati inseriti.</text:p>
      <text:p text:style-name="P132">4b. i dati inseriti non sono validi.</text:p>
      <text:p text:style-name="P133">1 L’utente ripete i punti 3a.3-4</text:p>
      <text:p text:style-name="P134">2 Il sistema salva le modifiche.</text:p>
      <text:p text:style-name="P135">3 Il sistema mostra un messaggio di conferma dell’avvenuto aggiornamento.</text:p>
      <text:p text:style-name="P136">4 Il sistema visualizza il profilo aggiornato.</text:p>
      <text:p text:style-name="P137">5 Il l flusso riprende dal punto 3 del flusso principale.</text:p>
      <text:soft-page-break/>
      <text:p text:style-name="P138"> </text:p>
      <text:p text:style-name="P139">3b. L'utente sceglie di visualizzare la lista "nel cuore".</text:p>
      <text:p text:style-name="P140">1 Il sistema mostra tutti gli artisti presenti nella lista.</text:p>
      <text:p text:style-name="P141">2 L’utente sceglie di visualizzare il profilo di un’artista presente nella lista.</text:p>
      <text:p text:style-name="P142">2b. L'utente rimuove un artista dalla lista selezionando l'opzione di rimozione.</text:p>
      <text:p text:style-name="P143">1 Il sistema rimuove l’artista dalla lista “nel cuore”.</text:p>
      <text:p text:style-name="P144">2 Il sistema aggiorna la visualizzazione della lista.</text:p>
      <text:p text:style-name="P145">3 Il sistema riprende dal punto 3 del flusso principale.</text:p>
      <text:p text:style-name="P146"> </text:p>
      <text:p text:style-name="P147">3c. L'utente sceglie di visualizzare la galleria.</text:p>
      <text:list text:style-name="LFO19" text:continue-numbering="true">
        <text:list-item>
          <text:p text:style-name="P148">La galleria è vuota, Il sistema mostra la sezione galleria vuota con un messaggio informativo che invita l'utente a creare e caricare la prima opera.</text:p>
        </text:list-item>
      </text:list>
      <text:p text:style-name="P149">1b. L'utente seleziona un'opera dalla galleria.</text:p>
      <text:list text:style-name="LFO30" text:continue-numbering="true">
        <text:list-item>
          <text:p text:style-name="P150"><text:span text:style-name="T151">Il sistema mostra l’opera con i dettagli (numero like, commenti).</text:span></text:p>
        </text:list-item>
        <text:list-item>
          <text:p text:style-name="P152"><text:span text:style-name="T153">L’utente<text:s/></text:span><text:span text:style-name="T154">seleziona l’azione da eseguire</text:span><text:span text:style-name="T155">.</text:span></text:p>
        </text:list-item>
      </text:list>
      <text:p text:style-name="P156">2b. L’utente sceglie di eliminare l’opera.</text:p>
      <text:list text:style-name="LFO31" text:continue-numbering="true">
        <text:list-item>
          <text:p text:style-name="P157">Il sistema<text:s/>chiede conferma.</text:p>
        </text:list-item>
        <text:list-item>
          <text:p text:style-name="P158">L’utente conferma.</text:p>
        </text:list-item>
      </text:list>
      <text:p text:style-name="P159">2a. L’utente non conferma.</text:p>
      <text:list text:style-name="LFO32" text:continue-numbering="true">
        <text:list-item>
          <text:p text:style-name="P160">Il sistema riprende dal punto 1b-1 del flusso alternativo.</text:p>
        </text:list-item>
      </text:list>
      <text:list text:style-name="LFO31" text:continue-numbering="true">
        <text:list-item>
          <text:p text:style-name="P161">Il sistema elimina l’opera.</text:p>
        </text:list-item>
        <text:list-item>
          <text:p text:style-name="P162">La galleria viene aggiornata.</text:p>
        </text:list-item>
        <text:list-item>
          <text:p text:style-name="P163">L’utente visualizza la galleria aggiornata.</text:p>
        </text:list-item>
      </text:list>
      <text:p text:style-name="P164">2c. L’utente sceglie di nascondere l’opera.</text:p>
      <text:list text:style-name="LFO34" text:continue-numbering="true">
        <text:list-item>
          <text:p text:style-name="P165">Il sistema nasconde l’opera.</text:p>
        </text:list-item>
        <text:list-item>
          <text:p text:style-name="P166">La galleria viene aggiornata.</text:p>
        </text:list-item>
        <text:list-item>
          <text:p text:style-name="P167">L’utente visualizza la galleria aggiornata.</text:p>
        </text:list-item>
      </text:list>
      <text:p text:style-name="P168">2d. L’utente sceglie di rendere visibile un’opera nascosta</text:p>
      <text:list text:style-name="LFO33" text:continue-numbering="true">
        <text:list-item>
          <text:p text:style-name="P169">Il sistema rende visibile l’opera.</text:p>
        </text:list-item>
        <text:list-item>
          <text:p text:style-name="P170">La galleria viene aggiornata.</text:p>
        </text:list-item>
        <text:list-item>
          <text:p text:style-name="P171">L’utente visualizza la galleria aggiornata.</text:p>
        </text:list-item>
      </text:list>
      <text:p text:style-name="P172">2e. L'utente sceglie di scaricare l'opera.</text:p>
      <text:list text:style-name="LFO38" text:continue-numbering="true">
        <text:list-item>
          <text:p text:style-name="P173">Il sistema chiede conferma all’utente.</text:p>
        </text:list-item>
        <text:list-item>
          <text:p text:style-name="P174">L’opera viene scaricata.</text:p>
        </text:list-item>
        <text:list-item>
          <text:p text:style-name="P175">L’utente torna a visualizzare l’opera corrente. </text:p>
        </text:list-item>
      </text:list>
      <text:p text:style-name="P176">Requisiti speciali:</text:p>
      <text:list text:style-name="LFO20" text:continue-numbering="true">
        <text:list-item>
          <text:p text:style-name="P177">Il sistema deve garantire che solo l’utente autenticato possa modificare il proprio profilo.</text:p>
        </text:list-item>
        <text:list-item>
          <text:p text:style-name="P178">La lista “Nel cuore” deve essere aggiornata in tempo reale.</text:p>
        </text:list-item>
        <text:list-item>
          <text:p text:style-name="P179">Il sistema deve mantenere la consistenza dei dati tra profilo, galleria e “Nel cuore”.</text:p>
        </text:list-item>
      </text:list>
      <text:p text:style-name="P180"> </text:p>
      <text:p text:style-name="Normale"><text:span text:style-name="T181">Variabili tecnologiche</text:span><text:span text:style-name="T182">:</text:span></text:p>
      <text:p text:style-name="Normale"><text:span text:style-name="T183">(DA CHIEDERE)</text:span></text:p>
      <text:p text:style-name="P184"> </text:p>
      <text:p text:style-name="P185">2.2.3 Ricerca artisti</text:p>
      <text:p text:style-name="Normale"><text:span text:style-name="T186">Portata:</text:span><text:span text:style-name="T187"><text:s/>Piattaforma di creazione e condivisione d’arte.</text:span></text:p>
      <text:p text:style-name="Normale"><text:span text:style-name="T188">Livello:</text:span><text:span text:style-name="T189"><text:s/>Obiettivo utente.</text:span></text:p>
      <text:p text:style-name="Normale"><text:span text:style-name="T190">Attore primario:</text:span><text:span text:style-name="T191"><text:s/>Utente e amministratore.</text:span></text:p>
      <text:p text:style-name="Normale"><text:span text:style-name="T192">Parti interessate e interessi:</text:span></text:p>
      <text:list text:style-name="LFO21" text:continue-numbering="true">
        <text:list-item>
          <text:p text:style-name="P193"><text:span text:style-name="T194">Utente:</text:span><text:span text:style-name="T195"><text:s/>Vuole visualizzare il profilo di altri artisti, ed eventualmente visualizzarne le opere ed inserirli nella lista “Nel cuore”.</text:span></text:p>
        </text:list-item>
        <text:list-item>
          <text:p text:style-name="P196"><text:span text:style-name="T197">Amministratore:<text:s/></text:span><text:span text:style-name="T198">Vuole visualizzare il profilo degli artisti, ed eventualmente<text:s/></text:span><text:span text:style-name="T199">bloccare o rimuovere i profili che non rispettano le linee guida.</text:span></text:p>
        </text:list-item>
        <text:list-item>
          <text:p text:style-name="P200"><text:span text:style-name="T201">Sistema:</text:span><text:span text:style-name="T202"><text:s/>Vuole permettere all’utente e all’amministratore di visualizzare i profili degli altri artisti<text:s/></text:span><text:span text:style-name="T203">e fornire agli amministratori gli strumenti per bloccare o sbloccare gli account che non rispettano le linee guida della piattaforma.</text:span></text:p>
        </text:list-item>
      </text:list>
      <text:p text:style-name="Normale"><text:span text:style-name="T204">Pre-condizioni:</text:span><text:span text:style-name="T205"><text:s/></text:span></text:p>
      <text:list text:style-name="LFO22" text:continue-numbering="true">
        <text:list-item>
          <text:p text:style-name="P206">L’utente è loggato nell’applicazione.<text:s/></text:p>
        </text:list-item>
        <text:list-item>
          <text:p text:style-name="P207"><text:span text:style-name="T208">L’amministratore è loggato nell’applicazione.</text:span></text:p>
        </text:list-item>
      </text:list>
      <text:p text:style-name="Normale"><text:span text:style-name="T209">Garanzia di successo:</text:span><text:span text:style-name="T210"><text:s/></text:span></text:p>
      <text:list text:style-name="LFO23" text:continue-numbering="true">
        <text:list-item>
          <text:p text:style-name="P211">L’utente è riuscito correttamente a visualizzare il profilo di altri artisti e ha avuto facoltà di visualizzarne le opere e inserire gli artisti nella lista “Nel cuore”.</text:p>
        </text:list-item>
        <text:list-item>
          <text:p text:style-name="P212"><text:span text:style-name="T213">L’amministratore è riuscito correttamente a visualizzare il profilo degli artisti e ha avuto facoltà di<text:s/></text:span><text:span text:style-name="T214">bloccare, sbloccare o rimuovere<text:s/></text:span><text:span text:style-name="T215">coloro che non hanno rispettato le<text:s/></text:span><text:span text:style-name="T216">linee guida</text:span><text:span text:style-name="T217">.</text:span></text:p>
        </text:list-item>
      </text:list>
      <text:p text:style-name="P218">Scenario principale di successo</text:p>
      <text:p text:style-name="P219">1. <text:s/>L’utente vuole visualizzare il profilo di un altro artista.</text:p>
      <text:p text:style-name="P220">2. Il sistema mostra all’utente tutti gli artisti presenti col nome cercato.</text:p>
      <text:p text:style-name="P221">3. L’utente sceglie l’artista che gli interessa.</text:p>
      <text:p text:style-name="P222">4. Il sistema mostra all’utente il profilo dell’artista scelto.<text:s/></text:p>
      <text:p text:style-name="Normale"><text:span text:style-name="T223">5. L’utente sceglie<text:s/></text:span><text:span text:style-name="T224">cosa visualizzare</text:span><text:span text:style-name="T225">.</text:span></text:p>
      <text:p text:style-name="Normale"><text:span text:style-name="T226">6. Il sistema mostra<text:s/></text:span><text:span text:style-name="T227">la sezione scelta dall’utente</text:span><text:span text:style-name="T228">.</text:span></text:p>
      <text:p text:style-name="P229">7. L’utente sceglie di uscire dal profilo dell’artista.</text:p>
      <text:p text:style-name="P230">8. Il sistema smette di mostrare il profilo dell’artista all’utente.</text:p>
      <text:p text:style-name="P231"/>
      <text:p text:style-name="P232">Flussi alternativi</text:p>
      <text:soft-page-break/>
      <text:p text:style-name="Normale"><text:span text:style-name="T233">*a In qualsiasi momento l’utente o l’amministratore decidono di annullare la ricerca<text:s/></text:span><text:span text:style-name="T234">o</text:span><text:span text:style-name="T235"><text:s/>la visualizzazione dei profili degli altri artisti.<text:s/></text:span></text:p>
      <text:p text:style-name="P236"><text:tab/>1 Termina il caso d’uso.</text:p>
      <text:p text:style-name="P237">1a. L’amministratore vuole visualizzare il profilo di un’artista.<text:s/></text:p>
      <text:p text:style-name="P238">1 Il sistema mostra all’amministratore tutti gli artisti presenti col nome cercato.</text:p>
      <text:p text:style-name="P239">2 L’amministratore sceglie l’artista che gli interessa.</text:p>
      <text:p text:style-name="P240">3 Il sistema mostra il profilo dell’artista scelto.</text:p>
      <text:p text:style-name="P241">4 L’amministratore sceglie l’operazione che vuole eseguire sull’utente.</text:p>
      <text:p text:style-name="Paragrafoelenco"><text:span text:style-name="T242"><text:tab/></text:span><text:span text:style-name="T243">4a. L’amministratore sceglie di bloccare il profilo dell’artista.</text:span></text:p>
      <text:p text:style-name="P244"><text:tab/><text:tab/>1 Il sistema chiede conferma all’amministratore.</text:p>
      <text:p text:style-name="P245"><text:tab/><text:tab/>2 L’amministratore conferma la scelta.</text:p>
      <text:p text:style-name="Paragrafoelenco"><text:span text:style-name="T246"><text:tab/></text:span><text:span text:style-name="T247"><text:tab/></text:span><text:span text:style-name="T248"><text:tab/></text:span><text:span text:style-name="T249">2a. L’amministratore non conferma la scelta.</text:span></text:p>
      <text:p text:style-name="P250">1Il flusso riprende dal punto 1a-3 del flusso alternativo.</text:p>
      <text:p text:style-name="P251"><text:tab/><text:tab/>3 Il sistema procede nel bloccare il profilo dell’utente scelto.</text:p>
      <text:p text:style-name="P252"><text:tab/><text:tab/>4 Il sistema riprende dal punto 1a-3 del flusso alternativo.</text:p>
      <text:p text:style-name="Paragrafoelenco"><text:span text:style-name="T253"><text:tab/></text:span><text:span text:style-name="T254">4b. L’amministratore sceglie di sbloccare il profilo dell’artista.</text:span></text:p>
      <text:p text:style-name="P255"><text:tab/><text:tab/>1 Il sistema chiede conferma all’amministratore.</text:p>
      <text:p text:style-name="P256"><text:tab/><text:tab/>2 L’amministratore conferma la scelta.</text:p>
      <text:p text:style-name="Paragrafoelenco"><text:span text:style-name="T257"><text:tab/></text:span><text:span text:style-name="T258"><text:tab/></text:span><text:span text:style-name="T259"><text:tab/></text:span><text:span text:style-name="T260">2a. L’amministratore non conferma la scelta.</text:span></text:p>
      <text:p text:style-name="P261">1Il flusso riprende dal punto 1a-3 del flusso alternativo.</text:p>
      <text:p text:style-name="P262">3 Il sistema procede nello sbloccare il profilo dell’utente scelto.</text:p>
      <text:p text:style-name="P263"><text:tab/><text:tab/>4 Il sistema riprende dal punto 1a-3 del flusso alternativo.</text:p>
      <text:p text:style-name="P264">5a. L’utente sceglie di inserire l’artista nella sua lista “Nel cuore”.</text:p>
      <text:list text:style-name="LFO27" text:continue-numbering="true">
        <text:list-item>
          <text:p text:style-name="P265">Il sistema aggiorna la lista “Nel cuore” dell’utente.</text:p>
        </text:list-item>
        <text:list-item>
          <text:p text:style-name="P266">Il<text:s/>sistema<text:s/>riprende dal punto 4 del flusso principale.</text:p>
        </text:list-item>
      </text:list>
      <text:p text:style-name="P267">5b.<text:s/>L’utente sceglie di visualizzare la galleria dell’artista.</text:p>
      <text:list text:style-name="LFO28" text:continue-numbering="true">
        <text:list-item>
          <text:p text:style-name="P268">Il sistema mostra la galleria.</text:p>
        </text:list-item>
        <text:list-item>
          <text:p text:style-name="P269">L’utente sceglie di visualizzare un’opera.</text:p>
        </text:list-item>
      </text:list>
      <text:soft-page-break/>
      <text:p text:style-name="P270"><text:span text:style-name="T271">2a.<text:s/></text:span><text:span text:style-name="T272">L</text:span><text:span text:style-name="T273">’utente sce</text:span><text:span text:style-name="T274">glie di<text:s/></text:span><text:span text:style-name="T275">uscire dalla galleria dell’artista</text:span><text:span text:style-name="T276">.</text:span></text:p>
      <text:list text:style-name="LFO29" text:continue-numbering="true">
        <text:list-item>
          <text:p text:style-name="P277">Il sistema riprende dal punto 4 del flusso principale.</text:p>
        </text:list-item>
      </text:list>
      <text:list text:style-name="LFO28" text:continue-numbering="true">
        <text:list-item>
          <text:p text:style-name="P278">Il sistema mostra l’opera all’utente.</text:p>
        </text:list-item>
        <text:list-item>
          <text:p text:style-name="P279">L’utente seleziona l’azione da eseguire.</text:p>
        </text:list-item>
      </text:list>
      <text:p text:style-name="P280">4a.<text:s/>L'utente sceglie di scaricare l'opera.</text:p>
      <text:list text:style-name="LFO35" text:continue-numbering="true">
        <text:list-item>
          <text:p text:style-name="P281">Il sistema chiede conferma all’utente.</text:p>
        </text:list-item>
        <text:list-item>
          <text:p text:style-name="P282">L’utente conferma.</text:p>
        </text:list-item>
      </text:list>
      <text:p text:style-name="P283">2a. L’utente non conferma.</text:p>
      <text:list text:style-name="LFO36" text:continue-numbering="true">
        <text:list-item>
          <text:p text:style-name="P284">Il sistema riprende dal punto 5b-3 del flusso alternativo.</text:p>
        </text:list-item>
      </text:list>
      <text:list text:style-name="LFO35" text:continue-numbering="true">
        <text:list-item>
          <text:p text:style-name="P285">L’opera viene scaricata.</text:p>
        </text:list-item>
        <text:list-item>
          <text:p text:style-name="P286">L’utente torna a visualizzare l’opera corrente. </text:p>
        </text:list-item>
      </text:list>
      <text:p text:style-name="P287">4b. L’utente vuole tornare a visualizzare la galleria.</text:p>
      <text:list text:style-name="LFO37" text:continue-numbering="true">
        <text:list-item>
          <text:p text:style-name="P288">Il sistema riprende dal punto 5b-1 del flusso alternativo.</text:p>
        </text:list-item>
      </text:list>
      <text:p text:style-name="P289"/>
      <text:p text:style-name="P290"/>
      <text:p text:style-name="P291"/>
      <text:p text:style-name="Normale"/>
      <text:p text:style-name="Normale"><text:span text:style-name="T292"> </text:span></text:p>
      <text:p text:style-name="Normale"><text:span text:style-name="T293">2.2.4 Gestione opere</text:span></text:p>
      <text:p text:style-name="Normale"><text:span text:style-name="T294">Portata:</text:span><text:span text:style-name="T295"><text:s/>Piattaforma di creazione e condivisione d’arte.</text:span></text:p>
      <text:p text:style-name="Normale"><text:span text:style-name="T296">Livello:</text:span><text:span text:style-name="T297"><text:s/>Obiettivo utente.</text:span></text:p>
      <text:p text:style-name="Normale"><text:span text:style-name="T298">Attore primario:</text:span><text:span text:style-name="T299"><text:s/>Utente.</text:span></text:p>
      <text:p text:style-name="Normale"><text:span text:style-name="T300">Parti interessate e interessi:</text:span></text:p>
      <text:list text:style-name="LFO24" text:continue-numbering="true">
        <text:list-item>
          <text:p text:style-name="P301"><text:span text:style-name="T302">Utente:</text:span><text:span text:style-name="T303"><text:s/>Vuole creare una nuova opera e caricarla sul profilo.</text:span></text:p>
        </text:list-item>
        <text:list-item>
          <text:p text:style-name="P304"><text:span text:style-name="T305">Sistema:</text:span><text:span text:style-name="T306"><text:s/>Vuole permettere all’utente di creare un’opera e renderla visibile sul profilo.</text:span></text:p>
        </text:list-item>
      </text:list>
      <text:p text:style-name="Normale"><text:span text:style-name="T307">Pre-condizioni:</text:span><text:span text:style-name="T308"><text:s/>L’utente è loggato nell’applicazione.</text:span></text:p>
      <text:soft-page-break/>
      <text:p text:style-name="Normale"><text:span text:style-name="T309">Garanzia di successo:</text:span><text:span text:style-name="T310"><text:s/>L’utente riesce a creare un’opera e caricarla sul profilo.</text:span></text:p>
      <text:p text:style-name="P311">Scenario principale di successo</text:p>
      <text:p text:style-name="P312">1. L’utente vuole creare una nuova opera.</text:p>
      <text:p text:style-name="P313">2. Il sistema mostra la tela bianca con i vari oggetti utilizzabili dall’utente.</text:p>
      <text:p text:style-name="P314">3. L’utente sceglie uno strumento tra quelli disponibili.</text:p>
      <text:p text:style-name="Normale"><text:span text:style-name="T315">4. L’utente interagisce<text:s/></text:span><text:span text:style-name="T316">con</text:span><text:span text:style-name="T317"><text:s/>la lavagna.</text:span></text:p>
      <text:p text:style-name="P318">5. Il sistema mostra in tempo reale l’interazione che ha l’utente con la lavagna.</text:p>
      <text:p text:style-name="P319">6. Si ripetono i punti 4-5 fin quando l’utente non ritiene l’opera conclusa.</text:p>
      <text:p text:style-name="P320">7. L’utente comunica al sistema che ha terminato.</text:p>
      <text:p text:style-name="P321">8. Il sistema chiede conferma.</text:p>
      <text:p text:style-name="P322">9. Il sistema pubblica l’opera sul profilo ed aggiorna la galleria.</text:p>
      <text:p text:style-name="P323"> </text:p>
      <text:p text:style-name="P324">Flussi alternativi</text:p>
      <text:p text:style-name="P325">*a in qualsiasi momento l'utente può abbandonare la lavagna.</text:p>
      <text:list text:style-name="LFO25" text:continue-numbering="true">
        <text:list-item>
          <text:p text:style-name="P326">Il sistema chiede conferma all'utente.</text:p>
        </text:list-item>
      </text:list>
      <text:p text:style-name="P327">2 <text:s text:c="3"/>L'utente dà la conferma.</text:p>
      <text:p text:style-name="P328">2a L'utente annulla l'operazione di abbandono.</text:p>
      <text:list text:style-name="LFO26" text:continue-numbering="true">
        <text:list-item>
          <text:p text:style-name="P329">Il caso d'uso riprende da dove è stato interrotto.</text:p>
        </text:list-item>
      </text:list>
      <text:p text:style-name="P330"><text:s text:c="5"/>3 <text:s/>Termina il caso d'uso.<text:s/></text:p>
      <text:p text:style-name="Normale"><text:span text:style-name="T331"> </text:span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Collegamentoipertestuale" style:display-name="Collegamento ipertestuale" style:family="text" style:parent-style-name="Car.predefinitoparagraf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5LVL1" style:family="text">
      <style:text-properties style:font-name="Aptos" style:font-name-asian="Aptos" style:font-name-complex="Times New Roman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8LVL1" style:family="text">
      <style:text-properties fo:font-weight="normal" style:font-weight-asian="normal" style:font-weight-complex="normal"/>
    </style:style>
    <style:style style:name="WW_CharLFO29LVL1" style:family="text">
      <style:text-properties fo:font-weight="normal" style:font-weight-asian="normal" style:font-weight-complex="normal"/>
    </style:style>
    <style:style style:name="WW_CharLFO30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list-format-name="NLF1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list-format-name="NLF1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27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8">
      <text:list-level-style-number text:level="1" text:style-name="WW_CharLFO28LVL1" style:num-suffix="." style:num-list-format-name="NLF0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9">
      <text:list-level-style-number text:level="1" text:style-name="WW_CharLFO29LVL1" style:num-suffix="." style:num-list-format-name="NLF0" style:num-format="1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85in" text:min-label-width="0.125in" text:list-level-position-and-space-mode="label-alignment">
          <style:list-level-label-alignment text:label-followed-by="listtab" fo:margin-left="2.9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35in" text:min-label-width="0.125in" text:list-level-position-and-space-mode="label-alignment">
          <style:list-level-label-alignment text:label-followed-by="listtab" fo:margin-left="4.4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85in" text:min-label-width="0.125in" text:list-level-position-and-space-mode="label-alignment">
          <style:list-level-label-alignment text:label-followed-by="listtab" fo:margin-left="5.975in" fo:text-indent="-0.125in"/>
        </style:list-level-properties>
      </text:list-level-style-number>
    </text:list-style>
    <text:list-style style:name="LFO30">
      <text:list-level-style-number text:level="1" text:style-name="WW_CharLFO30LVL1" style:num-suffix="." style:num-list-format-name="NLF0" style:num-format="1">
        <style:list-level-properties text:space-before="1.3777in" text:min-label-width="0.25in" text:list-level-position-and-space-mode="label-alignment">
          <style:list-level-label-alignment text:label-followed-by="listtab" fo:margin-left="1.627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8777in" text:min-label-width="0.25in" text:list-level-position-and-space-mode="label-alignment">
          <style:list-level-label-alignment text:label-followed-by="listtab" fo:margin-left="2.127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5027in" text:min-label-width="0.125in" text:list-level-position-and-space-mode="label-alignment">
          <style:list-level-label-alignment text:label-followed-by="listtab" fo:margin-left="2.627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8777in" text:min-label-width="0.25in" text:list-level-position-and-space-mode="label-alignment">
          <style:list-level-label-alignment text:label-followed-by="listtab" fo:margin-left="3.127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3777in" text:min-label-width="0.25in" text:list-level-position-and-space-mode="label-alignment">
          <style:list-level-label-alignment text:label-followed-by="listtab" fo:margin-left="3.627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0027in" text:min-label-width="0.125in" text:list-level-position-and-space-mode="label-alignment">
          <style:list-level-label-alignment text:label-followed-by="listtab" fo:margin-left="4.127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3777in" text:min-label-width="0.25in" text:list-level-position-and-space-mode="label-alignment">
          <style:list-level-label-alignment text:label-followed-by="listtab" fo:margin-left="4.627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8777in" text:min-label-width="0.25in" text:list-level-position-and-space-mode="label-alignment">
          <style:list-level-label-alignment text:label-followed-by="listtab" fo:margin-left="5.127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5027in" text:min-label-width="0.125in" text:list-level-position-and-space-mode="label-alignment">
          <style:list-level-label-alignment text:label-followed-by="listtab" fo:margin-left="5.6277in" fo:text-indent="-0.125in"/>
        </style:list-level-properties>
      </text:list-level-style-number>
    </text:list-style>
    <text:list-style style:name="LFO31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32">
      <text:list-level-style-number text:level="1" style:num-suffix="." style:num-list-format-name="NLF0" style:num-format="1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4.325in" text:min-label-width="0.125in" text:list-level-position-and-space-mode="label-alignment">
          <style:list-level-label-alignment text:label-followed-by="listtab" fo:margin-left="4.4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5.2in" text:min-label-width="0.25in" text:list-level-position-and-space-mode="label-alignment">
          <style:list-level-label-alignment text:label-followed-by="listtab" fo:margin-left="5.4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5.825in" text:min-label-width="0.125in" text:list-level-position-and-space-mode="label-alignment">
          <style:list-level-label-alignment text:label-followed-by="listtab" fo:margin-left="5.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6.2in" text:min-label-width="0.25in" text:list-level-position-and-space-mode="label-alignment">
          <style:list-level-label-alignment text:label-followed-by="listtab" fo:margin-left="6.4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6.7in" text:min-label-width="0.25in" text:list-level-position-and-space-mode="label-alignment">
          <style:list-level-label-alignment text:label-followed-by="listtab" fo:margin-left="6.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7.325in" text:min-label-width="0.125in" text:list-level-position-and-space-mode="label-alignment">
          <style:list-level-label-alignment text:label-followed-by="listtab" fo:margin-left="7.45in" fo:text-indent="-0.125in"/>
        </style:list-level-properties>
      </text:list-level-style-number>
    </text:list-style>
    <text:list-style style:name="LFO33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34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35">
      <text:list-level-style-number text:level="1" style:num-suffix="." style:num-list-format-name="NLF0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36">
      <text:list-level-style-number text:level="1" style:num-suffix="." style:num-list-format-name="NLF0" style:num-format="1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3416in" text:min-label-width="0.125in" text:list-level-position-and-space-mode="label-alignment">
          <style:list-level-label-alignment text:label-followed-by="listtab" fo:margin-left="3.466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8416in" text:min-label-width="0.125in" text:list-level-position-and-space-mode="label-alignment">
          <style:list-level-label-alignment text:label-followed-by="listtab" fo:margin-left="4.966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3416in" text:min-label-width="0.125in" text:list-level-position-and-space-mode="label-alignment">
          <style:list-level-label-alignment text:label-followed-by="listtab" fo:margin-left="6.4666in" fo:text-indent="-0.125in"/>
        </style:list-level-properties>
      </text:list-level-style-number>
    </text:list-style>
    <text:list-style style:name="LFO37">
      <text:list-level-style-number text:level="1" style:num-suffix="." style:num-list-format-name="NLF0" style:num-format="1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85in" text:min-label-width="0.125in" text:list-level-position-and-space-mode="label-alignment">
          <style:list-level-label-alignment text:label-followed-by="listtab" fo:margin-left="2.9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35in" text:min-label-width="0.125in" text:list-level-position-and-space-mode="label-alignment">
          <style:list-level-label-alignment text:label-followed-by="listtab" fo:margin-left="4.4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85in" text:min-label-width="0.125in" text:list-level-position-and-space-mode="label-alignment">
          <style:list-level-label-alignment text:label-followed-by="listtab" fo:margin-left="5.975in" fo:text-indent="-0.125in"/>
        </style:list-level-properties>
      </text:list-level-style-number>
    </text:list-style>
    <text:list-style style:name="LFO38">
      <text:list-level-style-number text:level="1" style:num-suffix="." style:num-list-format-name="NLF0" style:num-format="1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3416in" text:min-label-width="0.125in" text:list-level-position-and-space-mode="label-alignment">
          <style:list-level-label-alignment text:label-followed-by="listtab" fo:margin-left="3.466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8416in" text:min-label-width="0.125in" text:list-level-position-and-space-mode="label-alignment">
          <style:list-level-label-alignment text:label-followed-by="listtab" fo:margin-left="4.966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3416in" text:min-label-width="0.125in" text:list-level-position-and-space-mode="label-alignment">
          <style:list-level-label-alignment text:label-followed-by="listtab" fo:margin-left="6.4666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a La Chimia</meta:initial-creator>
    <dc:creator>JAGO FRANCESCO PULICANO</dc:creator>
    <meta:creation-date>2025-11-24T10:23:00Z</meta:creation-date>
    <dc:date>2025-12-10T11:23:00Z</dc:date>
    <meta:template xlink:href="Normal" xlink:type="simple"/>
    <meta:editing-cycles>28</meta:editing-cycles>
    <meta:editing-duration>PT0S</meta:editing-duration>
    <meta:document-statistic meta:page-count="12" meta:paragraph-count="25" meta:word-count="1931" meta:character-count="12914" meta:row-count="91" meta:non-whitespace-character-count="11008"/>
  </office:meta>
</office:document-meta>
</file>